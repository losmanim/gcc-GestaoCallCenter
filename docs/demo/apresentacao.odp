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0E12027F83717C36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Mono Uralic" svg:font-family="'Mono Uralic'" style:font-pitch="fixed"/>
    <style:font-face style:name="Mono Uralic1" svg:font-family="'Mono Ural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monofur" svg:font-family="monofur" style:font-pitch="variable"/>
    <style:font-face style:name="monofur1" svg:font-family="monofu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" style:family="graphic" style:parent-style-name="standard">
      <style:graphic-properties draw:stroke="none" draw:fill="none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  <style:paragraph-properties style:writing-mode="lr-tb"/>
    </style:style>
    <style:style style:name="pr1" style:family="presentation" style:parent-style-name="Metropolis-title">
      <style:graphic-properties draw:auto-grow-height="true"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3.007cm"/>
      <style:paragraph-properties style:writing-mode="lr-tb"/>
    </style:style>
    <style:style style:name="pr5" style:family="presentation" style:parent-style-name="Metropolis-outline1">
      <style:graphic-properties fo:min-height="4.781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r7" style:family="presentation" style:parent-style-name="Metropolis-title" style:list-style-name="L1">
      <style:graphic-properties draw:auto-grow-height="true" fo:min-height="4.255cm"/>
      <style:paragraph-properties style:writing-mode="lr-tb"/>
    </style:style>
    <style:style style:name="pr8" style:family="presentation" style:parent-style-name="Metropolis-title">
      <style:graphic-properties fo:min-height="2cm"/>
      <style:paragraph-properties style:writing-mode="lr-tb"/>
    </style:style>
    <style:style style:name="pr9" style:family="presentation" style:parent-style-name="Metropolis-title">
      <style:graphic-properties fo:min-height="2.23cm"/>
      <style:paragraph-properties style:writing-mode="lr-tb"/>
    </style:style>
    <style:style style:name="pr10" style:family="presentation" style:parent-style-name="Metropolis-title">
      <style:graphic-properties fo:min-height="1.916cm"/>
      <style:paragraph-properties style:writing-mode="lr-tb"/>
    </style:style>
    <style:style style:name="pr11" style:family="presentation" style:parent-style-name="Metropolis-title">
      <style:graphic-properties fo:min-height="1.6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6cm" fo:line-height="150%" fo:text-align="justify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00" loext:opacity="100%" loext:color-lum-mod="100%" loext:color-lum-off="0%" style:font-name="Mono Uralic" fo:text-shadow="1pt 1pt" fo:font-weight="bold" fo:background-color="transparent"/>
    </style:style>
    <style:style style:name="P5" style:family="paragraph">
      <style:paragraph-properties style:writing-mode="lr-tb"/>
      <style:text-properties style:font-name="Bitstream Vera Sans Mono" fo:font-weight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33pt" style:font-size-asian="33pt" style:font-size-complex="33pt"/>
    </style:style>
    <style:style style:name="P8" style:family="paragraph">
      <style:paragraph-properties style:writing-mode="lr-tb"/>
      <style:text-properties fo:color="#ffff00" loext:opacity="100%" loext:color-lum-mod="100%" loext:color-lum-off="0%" style:font-name="Noto Sans1" fo:font-size="39pt" fo:font-weight="bold"/>
    </style:style>
    <style:style style:name="P9" style:family="paragraph">
      <style:paragraph-properties style:writing-mode="lr-tb"/>
      <style:text-properties fo:color="#ffff00" loext:opacity="100%" loext:color-lum-mod="100%" loext:color-lum-off="0%" style:font-name="Noto Sans1" fo:font-size="37pt" style:font-size-asian="37pt" style:font-size-complex="37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 style:writing-mode="lr-tb"/>
      <style:text-properties fo:color="#d4ea6b" loext:opacity="100%" loext:color-lum-mod="100%" loext:color-lum-off="0%"/>
    </style:style>
    <style:style style:name="P12" style:family="paragraph">
      <style:paragraph-properties style:writing-mode="lr-tb"/>
      <style:text-properties fo:color="#ffffa6" loext:opacity="100%" loext:color-lum-mod="100%" loext:color-lum-off="0%" style:font-name="Bitstream Vera Sans Mono"/>
    </style:style>
    <style:style style:name="P13" style:family="paragraph">
      <style:paragraph-properties style:writing-mode="lr-tb"/>
      <style:text-properties fo:color="#3b160e" loext:opacity="100%" loext:color-lum-mod="100%" loext:color-lum-off="0%" style:font-name="Bitstream Vera Sans Mono"/>
    </style:style>
    <style:style style:name="P14" style:family="paragraph">
      <loext:graphic-properties draw:fill="none" draw:fill-color="#ffffff"/>
      <style:paragraph-properties style:writing-mode="lr-tb"/>
      <style:text-properties fo:color="#ffbf00" loext:opacity="100%" loext:color-lum-mod="100%" loext:color-lum-off="0%" style:font-name="Bitstream Vera Sans Mono"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color="#ffff00" loext:opacity="100%" loext:color-lum-mod="100%" loext:color-lum-off="0%" style:font-name="Bitstream Vera Sans Mono" fo:font-size="46pt" style:font-size-asian="46pt" style:font-size-complex="46pt"/>
    </style:style>
    <style:style style:name="P16" style:family="paragraph">
      <loext:graphic-properties draw:fill="none" draw:fill-color="#ffffff"/>
      <style:paragraph-properties style:writing-mode="lr-tb"/>
      <style:text-properties fo:color="#ffffd7" loext:opacity="100%" loext:color-lum-mod="100%" loext:color-lum-off="0%" style:font-name="Bitstream Vera Sans Mono" fo:font-weight="bold" style:font-weight-asian="bold" style:font-weight-complex="bold"/>
    </style:style>
    <style:style style:name="P17" style:family="paragraph">
      <style:paragraph-properties style:writing-mode="lr-tb"/>
      <style:text-properties fo:color="#ffbf00" loext:opacity="100%" loext:color-lum-mod="100%" loext:color-lum-off="0%" style:font-name="Bitstream Vera Sans Mono" fo:font-weight="bold" style:font-weight-asian="bold" style:font-weight-complex="bold"/>
    </style:style>
    <style:style style:name="P18" style:family="paragraph">
      <style:paragraph-properties style:writing-mode="lr-tb"/>
      <style:text-properties fo:color="#ffbf00" loext:opacity="100%" loext:color-lum-mod="100%" loext:color-lum-off="0%" style:font-name="Bitstream Vera Sans Mono" fo:font-weight="bold"/>
    </style:style>
    <style:style style:name="P19" style:family="paragraph">
      <style:paragraph-properties style:writing-mode="lr-tb"/>
      <style:text-properties fo:color="#ffbf00" loext:opacity="100%" loext:color-lum-mod="100%" loext:color-lum-off="0%" style:font-name="Noto Sans1" fo:font-weight="bold" style:font-weight-asian="bold" style:font-weight-complex="bold"/>
    </style:style>
    <style:style style:name="P20" style:family="paragraph">
      <style:paragraph-properties style:writing-mode="lr-tb"/>
      <style:text-properties fo:color="#ffff6d" loext:opacity="100%" loext:color-lum-mod="100%" loext:color-lum-off="0%"/>
    </style:style>
    <style:style style:name="P21" style:family="paragraph">
      <style:paragraph-properties fo:margin-top="0cm" fo:margin-bottom="0.6cm" fo:line-height="150%" fo:text-align="justify"/>
      <style:text-properties fo:color="#ffde59" loext:opacity="100%" fo:font-weight="normal"/>
    </style:style>
    <style:style style:name="P22" style:family="paragraph">
      <style:paragraph-properties fo:margin-top="0cm" fo:margin-bottom="0.6cm" fo:line-height="150%" fo:text-align="justify" style:writing-mode="lr-tb"/>
      <style:text-properties fo:color="#ffde59" loext:opacity="100%" loext:color-lum-mod="100%" loext:color-lum-off="0%" style:font-name="Noto Sans1" fo:font-size="36pt" fo:font-weight="normal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.6cm" fo:line-height="150%" fo:text-align="justify"/>
      <style:text-properties fo:color="#ffdbb6" loext:opacity="100%" fo:font-weight="bold"/>
    </style:style>
    <style:style style:name="P24" style:family="paragraph">
      <style:paragraph-properties fo:margin-top="0cm" fo:margin-bottom="0.6cm" fo:line-height="150%" fo:text-align="justify" style:writing-mode="lr-tb"/>
      <style:text-properties fo:color="#ffdbb6" loext:opacity="100%" loext:color-lum-mod="100%" loext:color-lum-off="0%" fo:font-size="26pt" fo:font-weight="bold" style:font-size-asian="26pt" style:font-size-complex="26pt"/>
    </style:style>
    <style:style style:name="P25" style:family="paragraph">
      <style:paragraph-properties fo:margin-top="0cm" fo:margin-bottom="0.6cm" fo:line-height="150%" fo:text-align="justify"/>
      <style:text-properties fo:color="#ffde59" loext:opacity="100%" fo:text-shadow="1pt 1pt"/>
    </style:style>
    <style:style style:name="P26" style:family="paragraph">
      <style:paragraph-properties fo:margin-top="0cm" fo:margin-bottom="0.6cm" fo:line-height="150%" fo:text-align="justify" style:writing-mode="lr-tb"/>
      <style:text-properties fo:color="#ffde59" loext:opacity="100%" loext:color-lum-mod="100%" loext:color-lum-off="0%" style:font-name="Noto Sans1" fo:text-shadow="1pt 1pt" fo:font-weight="bold" style:font-weight-asian="bold" style:font-weight-complex="bold"/>
    </style:style>
    <style:style style:name="P27" style:family="paragraph">
      <style:paragraph-properties fo:margin-top="0cm" fo:margin-bottom="0.6cm" fo:line-height="150%" fo:text-align="justify"/>
      <style:text-properties fo:color="#ffffa6" loext:opacity="100%" fo:font-weight="bold"/>
    </style:style>
    <style:style style:name="P28" style:family="paragraph">
      <style:paragraph-properties fo:margin-top="0cm" fo:margin-bottom="0.6cm" fo:line-height="150%" fo:text-align="justify" style:writing-mode="lr-tb"/>
      <style:text-properties fo:color="#ffffa6" loext:opacity="100%" loext:color-lum-mod="100%" loext:color-lum-off="0%" fo:font-size="26pt" fo:font-weight="bold" style:font-size-asian="26pt" style:font-size-complex="26pt"/>
    </style:style>
    <style:style style:name="P29" style:family="paragraph">
      <style:paragraph-properties fo:margin-top="0cm" fo:margin-bottom="0.6cm" fo:line-height="150%" fo:text-align="justify"/>
      <style:text-properties fo:color="#ffbf00" loext:opacity="100%"/>
    </style:style>
    <style:style style:name="P30" style:family="paragraph">
      <style:paragraph-properties fo:margin-top="0cm" fo:margin-bottom="0.6cm" fo:line-height="150%" fo:text-align="justify" style:writing-mode="lr-tb"/>
      <style:text-properties fo:color="#ffbf00" loext:opacity="100%" loext:color-lum-mod="100%" loext:color-lum-off="0%" style:font-name="Noto Sans1" fo:font-weight="bold" style:font-weight-asian="bold" style:font-weight-complex="bold"/>
    </style:style>
    <style:style style:name="P31" style:family="paragraph">
      <style:paragraph-properties fo:margin-top="0cm" fo:margin-bottom="0.6cm" fo:line-height="150%" fo:text-align="justify"/>
      <style:text-properties fo:color="#ffff6d" loext:opacity="100%" fo:font-weight="bold"/>
    </style:style>
    <style:style style:name="P32" style:family="paragraph">
      <style:paragraph-properties fo:margin-top="0cm" fo:margin-bottom="0.6cm" fo:line-height="150%" fo:text-align="justify" style:writing-mode="lr-tb"/>
      <style:text-properties fo:color="#ffff6d" loext:opacity="100%" loext:color-lum-mod="100%" loext:color-lum-off="0%" fo:font-size="26pt" fo:font-weight="bold" style:font-size-asian="26pt" style:font-size-complex="26pt"/>
    </style:style>
    <style:style style:name="P33" style:family="paragraph">
      <style:paragraph-properties fo:margin-top="0cm" fo:margin-bottom="0.6cm" fo:line-height="150%" fo:text-align="justify" style:writing-mode="lr-tb"/>
      <style:text-properties fo:color="#ffbf00" loext:opacity="100%" loext:color-lum-mod="100%" loext:color-lum-off="0%" style:font-name="Noto Sans1" fo:font-size="42pt" fo:font-weight="bold" style:font-size-asian="42pt" style:font-weight-asian="bold" style:font-size-complex="42pt" style:font-weight-complex="bold"/>
    </style:style>
    <style:style style:name="P34" style:family="paragraph">
      <style:paragraph-properties fo:margin-top="0cm" fo:margin-bottom="0.6cm" fo:line-height="150%" fo:text-align="justify" style:writing-mode="lr-tb"/>
      <style:text-properties fo:color="#ffff6d" loext:opacity="100%" loext:color-lum-mod="100%" loext:color-lum-off="0%" fo:font-weight="bold"/>
    </style:style>
    <style:style style:name="T1" style:family="text">
      <style:text-properties style:font-name="monofur1" fo:font-size="42pt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" style:family="text">
      <style:text-properties fo:color="#ffff00" loext:opacity="100%" style:font-name="Mono Uralic" fo:text-shadow="1pt 1pt" fo:font-weight="bold" fo:background-color="transparent"/>
    </style:style>
    <style:style style:name="T3" style:family="text">
      <style:text-properties fo:color="#ffff00" loext:opacity="100%" style:font-name="Mono Uralic" fo:font-size="37pt" fo:text-shadow="1pt 1pt" fo:font-weight="bold" fo:background-color="transparent" style:font-size-asian="37pt" style:font-size-complex="37pt"/>
    </style:style>
    <style:style style:name="T4" style:family="text">
      <style:text-properties style:font-name="Bitstream Vera Sans Mono" fo:font-weight="bold"/>
    </style:style>
    <style:style style:name="T5" style:family="text">
      <style:text-properties fo:color="#ffff00" loext:opacity="100%" style:font-name="Mono Uralic" fo:font-size="33pt" fo:text-shadow="1pt 1pt" fo:font-weight="bold" fo:background-color="transparent" style:font-size-asian="33pt" style:font-size-complex="33pt"/>
    </style:style>
    <style:style style:name="T6" style:family="text">
      <style:text-properties fo:color="#ffff00" loext:opacity="100%" style:font-name="Noto Sans1" fo:font-size="39pt" fo:font-weight="bold"/>
    </style:style>
    <style:style style:name="T7" style:family="text">
      <style:text-properties style:font-name="Bitstream Vera Sans Mono"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8" style:family="text">
      <style:text-properties fo:color="#ffff00" loext:opacity="100%" style:font-name="Noto Sans1" fo:font-size="37pt" style:font-size-asian="37pt" style:font-size-complex="37pt"/>
    </style:style>
    <style:style style:name="T9" style:family="text">
      <style:text-properties fo:color="#d4ea6b" loext:opacity="100%" style:font-name="Bitstream Vera Sans Mono"/>
    </style:style>
    <style:style style:name="T10" style:family="text">
      <style:text-properties fo:color="#ffffa6" loext:opacity="100%" style:font-name="Bitstream Vera Sans Mono"/>
    </style:style>
    <style:style style:name="T11" style:family="text">
      <style:text-properties fo:color="#3b160e" loext:opacity="100%" style:font-name="Bitstream Vera Sans Mono"/>
    </style:style>
    <style:style style:name="T12" style:family="text">
      <style:text-properties fo:color="#ffbf00" loext:opacity="100%" style:font-name="Bitstream Vera Sans Mono" fo:font-weight="bold" style:font-weight-asian="bold" style:font-weight-complex="bold"/>
    </style:style>
    <style:style style:name="T13" style:family="text">
      <style:text-properties fo:color="#ffff00" loext:opacity="100%" style:font-name="Bitstream Vera Sans Mono" fo:font-size="44pt" style:font-size-asian="44pt" style:font-size-complex="44pt"/>
    </style:style>
    <style:style style:name="T14" style:family="text">
      <style:text-properties fo:color="#ffffd7" loext:opacity="100%" style:font-name="Bitstream Vera Sans Mono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ffbf00" loext:opacity="100%" style:font-name="Bitstream Vera Sans Mono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fo:color="#ffbf00" loext:opacity="100%" style:font-name="Bitstream Vera Sans Mono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bf00" loext:opacity="100%" style:font-name="Bitstream Vera Sans Mono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bf00" loext:opacity="100%" style:font-name="Bitstream Vera Sans Mono" fo:font-style="italic" fo:font-weight="bold" style:font-style-asian="italic" style:font-style-complex="italic"/>
    </style:style>
    <style:style style:name="T19" style:family="text">
      <style:text-properties fo:color="#ffbf00" loext:opacity="100%" style:font-name="Bitstream Vera Sans Mono" fo:font-weight="bold"/>
    </style:style>
    <style:style style:name="T20" style:family="text">
      <style:text-properties fo:color="#ffbf00" loext:opacity="100%" style:font-name="Noto Sans1" fo:font-weight="bold" style:font-weight-asian="bold" style:font-weight-complex="bold"/>
    </style:style>
    <style:style style:name="T21" style:family="text">
      <style:text-properties fo:color="#ffff6d" loext:opacity="100%"/>
    </style:style>
    <style:style style:name="T22" style:family="text">
      <style:text-properties fo:color="#ffff6d" loext:opacity="100%" style:font-name="Bitstream Vera Sans Mono" fo:font-size="36pt" style:font-size-asian="36pt" style:font-size-complex="36pt"/>
    </style:style>
    <style:style style:name="T23" style:family="text">
      <style:text-properties style:font-name="monofur1" fo:font-size="44pt" fo:font-style="italic" style:font-size-asian="44pt" style:font-style-asian="italic" style:font-weight-asian="normal" style:font-size-complex="44pt" style:font-style-complex="italic" style:font-weight-complex="normal"/>
    </style:style>
    <style:style style:name="T24" style:family="text">
      <style:text-properties style:font-name="monofur1" fo:font-size="42pt" fo:font-style="italic" style:font-size-asian="42pt" style:font-style-asian="italic" style:font-weight-asian="normal" style:font-size-complex="42pt" style:font-style-complex="italic" style:font-weight-complex="normal"/>
    </style:style>
    <style:style style:name="T25" style:family="text">
      <style:text-properties style:font-name="monofur1"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 xml:id="id1" draw:id="i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GCC — Gestão Call Center</text:p>
          </draw:text-box>
        </draw:frame>
        <draw:frame presentation:style-name="pr2" draw:text-style-name="P1" draw:layer="layout" svg:width="25.2cm" svg:height="10.548cm" svg:x="1.4cm" svg:y="3.8cm" presentation:class="outline">
          <draw:text-box>
            <text:p text:style-name="P2"><text:span text:style-name="T1">Plataforma completa para call centers de telecomunicações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4" xml:id="id2" draw:id="id2">
        <office:forms form:automatic-focus="false" form:apply-design-mode="false"/>
        <draw:frame presentation:style-name="pr4" draw:text-style-name="P4" draw:layer="layout" svg:width="25.5cm" svg:height="3.007cm" svg:x="1.5cm" svg:y="0.497cm" presentation:class="title" presentation:user-transformed="true">
          <draw:text-box>
            <text:p><text:span text:style-name="T2">Por </text:span><text:span text:style-name="T3">que</text:span><text:span text:style-name="T2"> os call centers perdem vendas?</text:span></text:p>
          </draw:text-box>
        </draw:frame>
        <draw:frame presentation:style-name="pr5" draw:text-style-name="P5" draw:layer="layout" svg:width="25.2cm" svg:height="5.031cm" svg:x="1.4cm" svg:y="3.8cm" presentation:class="outline" presentation:user-transformed="true">
          <draw:text-box>
            <text:list text:style-name="L2">
              <text:list-item>
                <text:p><text:span text:style-name="T4">Problema: </text:span></text:p>
                <text:list>
                  <text:list-item>
                    <text:p><text:span text:style-name="T4">Gestores usam </text:span><text:span text:style-name="T4">excel, papel, </text:span><text:span text:style-name="T4">post-it</text:span></text:p>
                  </text:list-item>
                  <text:list-item>
                    <text:p><text:span text:style-name="T4">Sem script </text:span><text:span text:style-name="T4">padronizado</text:span></text:p>
                  </text:list-item>
                  <text:list-item>
                    <text:p><text:span text:style-name="T4">Objeções mal </text:span><text:span text:style-name="T4">tratadas</text:span></text:p>
                  </text:list-item>
                  <text:list-item>
                    <text:p><text:span text:style-name="T4">Sem fallow-up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2cm" svg:height="5.031cm" svg:x="1.4cm" svg:y="9.31cm" presentation:class="outline" presentation:user-transformed="true">
          <draw:text-box>
            <text:list text:style-name="L2">
              <text:list-item>
                <text:p><text:span text:style-name="T4">Consequência:</text:span></text:p>
                <text:list>
                  <text:list-item>
                    <text:p><text:span text:style-name="T4">Dados </text:span><text:span text:style-name="T4">perdidos, sem </text:span><text:span text:style-name="T4">histórico</text:span></text:p>
                  </text:list-item>
                  <text:list-item>
                    <text:p><text:span text:style-name="T4">Cada gestor </text:span><text:span text:style-name="T4">diz uma coisa</text:span></text:p>
                  </text:list-item>
                  <text:list-item>
                    <text:p><text:span text:style-name="T4">Clientes </text:span><text:span text:style-name="T4">desistem</text:span></text:p>
                  </text:list-item>
                  <text:list-item>
                    <text:p><text:span text:style-name="T4">Clientes </text:span><text:span text:style-name="T4">Cancelam na </text:span><text:span text:style-name="T4">instalaçã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4" xml:id="id3" draw:id="id3">
        <office:forms form:automatic-focus="false" form:apply-design-mode="false"/>
        <draw:frame presentation:style-name="pr7" draw:text-style-name="P7" draw:layer="layout" svg:width="22cm" svg:height="4.255cm" svg:x="3.3cm" svg:y="-0.027cm" presentation:class="title" presentation:user-transformed="true">
          <draw:text-box>
            <text:p text:style-name="P6"><text:span text:style-name="T5">Por que os call centers perdem vendas?</text:span></text:p>
          </draw:text-box>
        </draw:frame>
        <draw:frame presentation:style-name="pr5" draw:text-style-name="P5" draw:layer="layout" svg:width="25.2cm" svg:height="5.031cm" svg:x="1.4cm" svg:y="3.8cm" presentation:class="outline" presentation:user-transformed="true">
          <draw:text-box>
            <text:list text:style-name="L2">
              <text:list-item>
                <text:p><text:span text:style-name="T4">Problema:</text:span></text:p>
                <text:list>
                  <text:list-item>
                    <text:p><text:span text:style-name="T4">Sem KPIs em </text:span><text:span text:style-name="T4">tempo real</text:span></text:p>
                  </text:list-item>
                  <text:list-item>
                    <text:p><text:span text:style-name="T4">Aprovação de </text:span><text:span text:style-name="T4">contratos </text:span><text:span text:style-name="T4">demora dias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2cm" svg:height="5.031cm" svg:x="1.4cm" svg:y="9.31cm" presentation:class="outline" presentation:user-transformed="true">
          <draw:text-box>
            <text:list text:style-name="L2">
              <text:list-item>
                <text:p><text:span text:style-name="T4">Consequência: </text:span></text:p>
                <text:list>
                  <text:list-item>
                    <text:p><text:span text:style-name="T4">Gestão não vê </text:span><text:span text:style-name="T4">o que está a </text:span><text:span text:style-name="T4">acontecer</text:span></text:p>
                  </text:list-item>
                  <text:list-item>
                    <text:p><text:span text:style-name="T4">Cliente </text:span><text:span text:style-name="T4">arrefe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1T1" xml:id="id4" draw:id="id4">
        <office:forms form:automatic-focus="false" form:apply-design-mode="false"/>
        <draw:frame presentation:style-name="pr8" draw:text-style-name="P8" draw:layer="layout" svg:width="14.8cm" svg:height="2cm" svg:x="6.6cm" svg:y="0.6cm" presentation:class="title" presentation:user-transformed="true">
          <draw:text-box>
            <text:p><text:span text:style-name="T6">Fato comprovado</text:span></text:p>
          </draw:text-box>
        </draw:frame>
        <draw:frame presentation:style-name="pr2" draw:text-style-name="P1" draw:layer="layout" svg:width="25.2cm" svg:height="10.548cm" svg:x="1.4cm" svg:y="3.8cm" presentation:class="outline">
          <draw:text-box>
            <text:list text:style-name="L2">
              <text:list-header>
                <text:p/>
                <text:p/>
                <text:p><text:span text:style-name="T7">73% dos </text:span><text:span text:style-name="T7">leads </text:span><text:span text:style-name="T7">perdidos em </text:span><text:span text:style-name="T7">call center </text:span><text:span text:style-name="T7">devem-se a </text:span><text:span text:style-name="T7">follow-up </text:span><text:span text:style-name="T7">tardio ou </text:span><text:span text:style-name="T7">inexistente</text:span><text:span text:style-name="T7">. </text:span></text:p>
                <text:p><text:s text:c="33"/>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(Fonte: InsideSales)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etropolis" presentation:presentation-page-layout-name="AL3T34" xml:id="id5" draw:id="id5">
        <office:forms form:automatic-focus="false" form:apply-design-mode="false"/>
        <draw:frame presentation:style-name="pr8" draw:text-style-name="P9" draw:layer="layout" svg:width="14.8cm" svg:height="2cm" svg:x="6.6cm" svg:y="0.6cm" presentation:class="title">
          <draw:text-box>
            <text:p><text:span text:style-name="T8">A Solução</text:span><text:span text:style-name="T8"><text:tab/></text:span></text:p>
          </draw:text-box>
        </draw:frame>
        <draw:frame presentation:style-name="pr5" draw:text-style-name="P1" draw:layer="layout" svg:width="8.114cm" svg:height="5.031cm" svg:x="1.4cm" svg:y="3.8cm" presentation:class="outline" presentation:user-transformed="true">
          <draw:text-box>
            <text:list text:style-name="L2">
              <text:list-header>
                <text:p/>
                <text:p><text:span text:style-name="T9">Site de </text:span><text:span text:style-name="T9">Propaganda</text:span></text:p>
              </text:list-header>
            </text:list>
          </draw:text-box>
        </draw:frame>
        <draw:frame presentation:style-name="pr5" draw:text-style-name="P1" draw:layer="layout" svg:width="8.114cm" svg:height="5.031cm" svg:x="9.921cm" svg:y="3.8cm" presentation:class="outline">
          <draw:text-box>
            <text:list text:style-name="L2">
              <text:list-header>
                <text:p/>
                <text:p><text:span text:style-name="T10">Sistema de </text:span><text:span text:style-name="T10">Vendas </text:span><text:span text:style-name="T10">(Toolkit)</text:span></text:p>
              </text:list-header>
            </text:list>
          </draw:text-box>
        </draw:frame>
        <draw:frame presentation:style-name="pr5" draw:text-style-name="P1" draw:layer="layout" svg:width="8.114cm" svg:height="5.031cm" svg:x="18.442cm" svg:y="3.8cm" presentation:class="outline">
          <draw:text-box>
            <text:list text:style-name="L2">
              <text:list-header>
                <text:p/>
                <text:p><text:span text:style-name="T11">Gestãp de </text:span><text:span text:style-name="T11">Clientes (CRM)</text:span></text:p>
              </text:list-header>
            </text:list>
          </draw:text-box>
        </draw:frame>
        <draw:frame presentation:style-name="pr5" draw:text-style-name="P11" draw:layer="layout" svg:width="9.014cm" svg:height="5.341cm" svg:x="0.4cm" svg:y="9.4cm" presentation:class="outline" presentation:user-transformed="true">
          <draw:text-box>
            <text:list text:style-name="L2">
              <text:list-header>
                <text:p text:style-name="P10"><text:span text:style-name="T9">Capta leads </text:span><text:span text:style-name="T9">automaticamente </text:span><text:span text:style-name="T9">via formulário</text:span></text:p>
              </text:list-header>
            </text:list>
          </draw:text-box>
        </draw:frame>
        <draw:frame presentation:style-name="pr5" draw:text-style-name="P12" draw:layer="layout" svg:width="8.114cm" svg:height="5.031cm" svg:x="10.521cm" svg:y="9.31cm" presentation:class="outline" presentation:user-transformed="true">
          <draw:text-box>
            <text:list text:style-name="L2">
              <text:list-item>
                <text:p><text:span text:style-name="T10">Formação</text:span></text:p>
              </text:list-item>
              <text:list-item>
                <text:p><text:span text:style-name="T10">Script</text:span></text:p>
              </text:list-item>
              <text:list-item>
                <text:p><text:span text:style-name="T10">Objesões</text:span></text:p>
              </text:list-item>
              <text:list-item>
                <text:p><text:span text:style-name="T10">KPIs</text:span></text:p>
              </text:list-item>
            </text:list>
          </draw:text-box>
        </draw:frame>
        <draw:frame presentation:style-name="pr5" draw:text-style-name="P13" draw:layer="layout" svg:width="8.114cm" svg:height="5.031cm" svg:x="18.742cm" svg:y="9.31cm" presentation:class="outline" presentation:user-transformed="true">
          <draw:text-box>
            <text:list text:style-name="L2">
              <text:list-item>
                <text:p><text:span text:style-name="T11">Clientes</text:span></text:p>
              </text:list-item>
              <text:list-item>
                <text:p><text:span text:style-name="T11">Contratos</text:span></text:p>
              </text:list-item>
              <text:list-item>
                <text:p><text:span text:style-name="T11">Aprovações</text:span></text:p>
              </text:list-item>
            </text:list>
          </draw:text-box>
        </draw:frame>
        <draw:frame draw:style-name="gr2" draw:text-style-name="P14" draw:layer="layout" svg:width="14.9cm" svg:height="0.988cm" svg:x="7.4cm" svg:y="2.7cm">
          <draw:text-box>
            <text:p><text:span text:style-name="T12">GCC — Uma plataforma, três pilares</text:span></text:p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etropolis" xml:id="id6" draw:id="id6">
        <office:forms form:automatic-focus="false" form:apply-design-mode="false"/>
        <draw:frame draw:style-name="gr3" draw:text-style-name="P15" draw:layer="layout" svg:width="19cm" svg:height="2.5cm" svg:x="6.702cm" svg:y="0.588cm">
          <draw:text-box>
            <text:p><text:span text:style-name="T13">Funcionalidades</text:span></text:p>
          </draw:text-box>
        </draw:frame>
        <draw:frame draw:style-name="gr4" draw:text-style-name="P16" draw:layer="layout" svg:width="23cm" svg:height="2.563cm" svg:x="3.3cm" svg:y="6.5cm">
          <draw:text-box>
            <text:p><text:span text:style-name="T14">Para o Gestor de Vendas</text:span></text:p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etropolis" presentation:presentation-page-layout-name="AL4T18" xml:id="id7" draw:id="id7">
        <office:forms form:automatic-focus="false" form:apply-design-mode="false"/>
        <draw:frame presentation:style-name="pr8" draw:text-style-name="P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5" draw:text-style-name="P17" draw:layer="layout" svg:width="12.297cm" svg:height="10.7cm" svg:x="2.6cm" svg:y="3.9cm" presentation:class="outline" presentation:user-transformed="true">
          <draw:text-box>
            <text:list text:style-name="L2">
              <text:list-item>
                <text:p><text:span text:style-name="T15">Funcionalidade</text:span><text:span text:style-name="T16">:</text:span></text:p>
                <text:list>
                  <text:list-item>
                    <text:p><text:span text:style-name="T17">Prancha Rápida</text:span></text:p>
                  </text:list-item>
                  <text:list-item>
                    <text:p><text:span text:style-name="T17">Script </text:span><text:span text:style-name="T17">Completo</text:span></text:p>
                  </text:list-item>
                  <text:list-item>
                    <text:p><text:span text:style-name="T17">Objeções com </text:span><text:span text:style-name="T17">Respostas</text:span></text:p>
                  </text:list-item>
                  <text:list-item>
                    <text:p><text:span text:style-name="T17">KPIs </text:span><text:span text:style-name="T17">Automáticos</text:span></text:p>
                  </text:list-item>
                  <text:list-item>
                    <text:p><text:span text:style-name="T17">Checklist </text:span><text:span text:style-name="T17">Pré/Pós</text:span></text:p>
                  </text:list-item>
                  <text:list-item>
                    <text:p><text:span text:style-name="T17">Atalhos de </text:span><text:span text:style-name="T17">Teclado</text:span></text:p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2.297cm" svg:height="10.7cm" svg:x="14.313cm" svg:y="3.8cm" presentation:class="outline" presentation:user-transformed="true">
          <draw:text-box>
            <text:list text:style-name="L2">
              <text:list-item>
                <text:p><text:span text:style-name="T18">Benefício </text:span><text:span text:style-name="T18">Direto</text:span><text:span text:style-name="T19">:</text:span></text:p>
                <text:list>
                  <text:list-item>
                    <text:p><text:span text:style-name="T19">6 passos </text:span><text:span text:style-name="T19">visíveis </text:span><text:span text:style-name="T19">durante a </text:span><text:span text:style-name="T19">chamada. Zero </text:span><text:span text:style-name="T19">decoração</text:span></text:p>
                  </text:list-item>
                  <text:list-item>
                    <text:p><text:span text:style-name="T19">Pitch testado </text:span><text:span text:style-name="T19">e otimizado. </text:span><text:span text:style-name="T19">Copia e cola</text:span></text:p>
                  </text:list-item>
                  <text:list-item>
                    <text:p><text:span text:style-name="T19">15+ objeções </text:span><text:span text:style-name="T19">mapeadas com </text:span><text:span text:style-name="T19">contra-</text:span><text:span text:style-name="T19">argumentos</text:span></text:p>
                  </text:list-item>
                  <text:list-item>
                    <text:p><text:span text:style-name="T19">Taxa de </text:span><text:span text:style-name="T19">conversão, </text:span><text:span text:style-name="T19">funnel, metas </text:span><text:span text:style-name="T19">diárias</text:span></text:p>
                  </text:list-item>
                  <text:list-item>
                    <text:p><text:span text:style-name="T19">Disciplina de </text:span><text:span text:style-name="T19">chamada </text:span><text:span text:style-name="T19">garantida</text:span></text:p>
                  </text:list-item>
                  <text:list-item>
                    <text:p><text:span text:style-name="T19">Navega sem </text:span><text:span text:style-name="T19">rato (Alt+1 a </text:span><text:span text:style-name="T19">Alt+5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etropolis" presentation:presentation-page-layout-name="AL1T1" xml:id="id8" draw:id="id8">
        <office:forms form:automatic-focus="false" form:apply-design-mode="false"/>
        <draw:frame presentation:style-name="pr8" draw:text-style-name="P19" draw:layer="layout" svg:width="14.8cm" svg:height="2cm" svg:x="6.6cm" svg:y="0.6cm" presentation:class="title">
          <draw:text-box>
            <text:p><text:span text:style-name="T20">Resultado comprovado</text:span></text:p>
          </draw:text-box>
        </draw:frame>
        <draw:frame presentation:style-name="pr2" draw:text-style-name="P20" draw:layer="layout" svg:width="25.2cm" svg:height="10.548cm" svg:x="1.4cm" svg:y="1.9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  <text:p><text:span text:style-name="T21"/></text:p>
                <text:list>
                  <text:list-item>
                    <text:p><text:span text:style-name="T22">Equipas </text:span><text:span text:style-name="T22">que usam </text:span><text:span text:style-name="T22">scripts </text:span><text:span text:style-name="T22">padroniz</text:span><text:span text:style-name="T22">ados </text:span><text:span text:style-name="T22">aumentam </text:span><text:span text:style-name="T22">a </text:span><text:span text:style-name="T22">conversã</text:span><text:span text:style-name="T22">o em 32% </text:span><text:span text:style-name="T22">*(Fonte: </text:span><text:span text:style-name="T22">AA-ISP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etropolis" presentation:presentation-page-layout-name="AL2T14" xml:id="id9" draw:id="id9">
        <office:forms form:automatic-focus="false" form:apply-design-mode="false"/>
        <draw:frame presentation:style-name="pr8" draw:text-style-name="P22" draw:layer="layout" svg:width="14.8cm" svg:height="2.332cm" svg:x="8.2cm" svg:y="0.034cm" presentation:class="title" presentation:user-transformed="true">
          <draw:text-box>
            <text:p text:style-name="P21"><text:span text:style-name="T23">Funcionalidades</text:span></text:p>
          </draw:text-box>
        </draw:frame>
        <draw:frame presentation:style-name="pr2" draw:text-style-name="P24" draw:layer="layout" svg:width="25.2cm" svg:height="10.548cm" svg:x="1.4cm" svg:y="2.8cm" presentation:class="outline" presentation:user-transformed="true">
          <draw:text-box>
            <text:p text:style-name="P23"><text:span text:style-name="T23">Para o </text:span><text:span text:style-name="T23">Gestor de </text:span><text:span text:style-name="T23">Equipa / </text:span><text:span text:style-name="T23">Coordenador</text:span></text:p>
            <text:p text:style-name="P23"><text:span text:style-name="T24"/></text:p>
            <text:p text:style-name="P23"><text:span text:style-name="T23">Dashboard </text:span><text:span text:style-name="T23">em Tempo </text:span><text:span text:style-name="T23">Real — </text:span><text:span text:style-name="T23">Clientes, </text:span><text:span text:style-name="T23">contratos, </text:span><text:span text:style-name="T23">receita </text:span><text:span text:style-name="T23">mensal</text:span></text:p>
            <text:p text:style-name="P23"><text:span text:style-name="T23">CRM </text:span><text:span text:style-name="T23">Completo — </text:span><text:span text:style-name="T23">NIF, IBAN, </text:span><text:span text:style-name="T23">CVP, </text:span><text:span text:style-name="T23">morada, </text:span><text:span text:style-name="T23">histórico</text:span></text:p>
            <text:p text:style-name="P23"><text:span text:style-name="T23">Catálogo de </text:span><text:span text:style-name="T23">Serviços — </text:span><text:span text:style-name="T23">NOS, MEO, </text:span><text:span text:style-name="T23">Vodafone </text:span><text:span text:style-name="T23">com preços</text:span></text:p>
            <text:p text:style-name="P23"><text:span text:style-name="T23">Contratos </text:span><text:span text:style-name="T23">com </text:span><text:span text:style-name="T23">Workflow — </text:span><text:span text:style-name="T23">Criação, </text:span><text:span text:style-name="T23">edição, </text:span><text:span text:style-name="T23">aprovação </text:span><text:span text:style-name="T23">por email</text:span></text:p>
            <text:p text:style-name="P23"><text:span text:style-name="T23">Leads do </text:span><text:span text:style-name="T23">Site — </text:span><text:span text:style-name="T23">Captação </text:span><text:span text:style-name="T23">automática </text:span><text:span text:style-name="T23">com badge</text:span></text:p>
            <text:p text:style-name="P23"><text:span text:style-name="T23">Exportação </text:span><text:span text:style-name="T23">CSV — Dados </text:span><text:span text:style-name="T23">prontos </text:span><text:span text:style-name="T23">para Excel </text:span><text:span text:style-name="T23">ou </text:span><text:span text:style-name="T23">faturação</text:span></text:p>
          </draw:text-box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/>
      </draw:page>
      <draw:page draw:name="page10" draw:style-name="dp3" draw:master-page-name="Metropolis" presentation:presentation-page-layout-name="AL1T1" xml:id="id10" draw:id="id10">
        <office:forms form:automatic-focus="false" form:apply-design-mode="false"/>
        <draw:frame presentation:style-name="pr8" draw:text-style-name="P26" draw:layer="layout" svg:width="26.5cm" svg:height="2.23cm" svg:x="1cm" svg:y="0.085cm" presentation:class="title" presentation:user-transformed="true">
          <draw:text-box>
            <text:p text:style-name="P25"><text:span text:style-name="T1">O Diferencial: Aprovação por Email</text:span></text:p>
          </draw:text-box>
        </draw:frame>
        <draw:frame presentation:style-name="pr2" draw:text-style-name="P28" draw:layer="layout" svg:width="25.2cm" svg:height="10.548cm" svg:x="1.4cm" svg:y="3cm" presentation:class="outline" presentation:user-transformed="true">
          <draw:text-box>
            <text:p text:style-name="P27"><text:span text:style-name="T23">Gestor cria </text:span><text:span text:style-name="T23">contrato → </text:span><text:span text:style-name="T23">Envia </text:span><text:span text:style-name="T23">pedido de </text:span><text:span text:style-name="T23">aprovação</text:span></text:p>
            <text:p text:style-name="P27"><text:span text:style-name="T23">Cliente </text:span><text:span text:style-name="T23">recebe link </text:span><text:span text:style-name="T23">por email</text:span></text:p>
            <text:p text:style-name="P27"><text:span text:style-name="T23">Abre </text:span><text:span text:style-name="T23">página, vê </text:span><text:span text:style-name="T23">os detalhes </text:span><text:span text:style-name="T23">do contrato</text:span></text:p>
            <text:p text:style-name="P27"><text:span text:style-name="T23">Aprova ou </text:span><text:span text:style-name="T23">Rejeita com </text:span><text:span text:style-name="T23">1 clique</text:span></text:p>
            <text:p text:style-name="P27"><text:span text:style-name="T23">Estado </text:span><text:span text:style-name="T23">atualiza </text:span><text:span text:style-name="T23">automaticam</text:span><text:span text:style-name="T23">ente no </text:span><text:span text:style-name="T23">sistema</text:span></text:p>
            <text:p text:style-name="P27"><text:span text:style-name="T24"/></text:p>
            <text:p text:style-name="P27"><text:span text:style-name="T23">Impacto: </text:span><text:span text:style-name="T23">tempo de </text:span><text:span text:style-name="T23">fecho reduz </text:span><text:span text:style-name="T23">de 3 dias </text:span><text:span text:style-name="T23">para </text:span><text:span text:style-name="T23">minutos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/>
      </draw:page>
      <draw:page draw:name="page11" draw:style-name="dp3" draw:master-page-name="Metropolis" presentation:presentation-page-layout-name="AL2T14" xml:id="id11" draw:id="id11">
        <office:forms form:automatic-focus="false" form:apply-design-mode="false"/>
        <draw:frame presentation:style-name="pr9" draw:text-style-name="P30" draw:layer="layout" svg:width="20.5cm" svg:height="2.23cm" svg:x="4.5cm" svg:y="0.071cm" presentation:class="title" presentation:user-transformed="true">
          <draw:text-box>
            <text:p text:style-name="P29"><text:span text:style-name="T1">Métricas Reais (Benchmark)</text:span></text:p>
          </draw:text-box>
        </draw:frame>
        <draw:frame presentation:style-name="pr2" draw:text-style-name="P32" draw:layer="layout" svg:width="25.2cm" svg:height="10.548cm" svg:x="1.6cm" svg:y="3.2cm" presentation:class="outline" presentation:user-transformed="true">
          <draw:text-box>
            <text:p text:style-name="P31"><text:span text:style-name="T23">Chamadas/</text:span><text:span text:style-name="T23">dia/gestor: </text:span><text:span text:style-name="T23">40 → 65 </text:span><text:span text:style-name="T23">(+62%)</text:span></text:p>
            <text:p text:style-name="P31"><text:span text:style-name="T23">Taxa de </text:span><text:span text:style-name="T23">contacto: </text:span><text:span text:style-name="T23">22% → 35%</text:span></text:p>
            <text:p text:style-name="P31"><text:span text:style-name="T23">Conversão </text:span><text:span text:style-name="T23">(venda/cham</text:span><text:span text:style-name="T23">ada): 2.1% </text:span><text:span text:style-name="T23">→ 4.8% </text:span><text:span text:style-name="T23">(+129%)</text:span></text:p>
            <text:p text:style-name="P31"><text:span text:style-name="T23">Tempo médio </text:span><text:span text:style-name="T23">de fecho: </text:span><text:span text:style-name="T23">4.2 dias → </text:span><text:span text:style-name="T23">1.3 dias (-</text:span><text:span text:style-name="T23">69%)</text:span></text:p>
            <text:p text:style-name="P31"><text:span text:style-name="T23">Cancelament</text:span><text:span text:style-name="T23">os pós-</text:span><text:span text:style-name="T23">venda: 18% </text:span><text:span text:style-name="T23">→ 7% (-61%)</text:span></text:p>
            <text:p text:style-name="P31"><text:span text:style-name="T24"/></text:p>
            <text:p text:style-name="P31"><text:span text:style-name="T23">Baseado em </text:span><text:span text:style-name="T23">dados de </text:span><text:span text:style-name="T23">implementaç</text:span><text:span text:style-name="T23">ões reais </text:span><text:span text:style-name="T23">em call </text:span><text:span text:style-name="T23">centers PT</text:span></text:p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/>
      </draw:page>
      <draw:page draw:name="page12" draw:style-name="dp3" draw:master-page-name="Metropolis" presentation:presentation-page-layout-name="AL2T14" xml:id="id12" draw:id="id12">
        <office:forms form:automatic-focus="false" form:apply-design-mode="false"/>
        <draw:frame presentation:style-name="pr9" draw:text-style-name="P30" draw:layer="layout" svg:width="19.5cm" svg:height="2.23cm" svg:x="5.2cm" svg:y="0.121cm" presentation:class="title" presentation:user-transformed="true">
          <draw:text-box>
            <text:p text:style-name="P29"><text:span text:style-name="T1">O que dizem os Gestores</text:span></text:p>
          </draw:text-box>
        </draw:frame>
        <draw:frame presentation:style-name="pr2" draw:text-style-name="P32" draw:layer="layout" svg:width="25.2cm" svg:height="10.548cm" svg:x="1.4cm" svg:y="3.5cm" presentation:class="outline" presentation:user-transformed="true">
          <draw:text-box>
            <text:p text:style-name="P31"><text:span text:style-name="T23">"Deixei de </text:span><text:span text:style-name="T23">precisar de </text:span><text:span text:style-name="T23">post-it. </text:span><text:span text:style-name="T23">Tenho tudo </text:span><text:span text:style-name="T23">num ecrã." </text:span><text:span text:style-name="T23">— Ana S., </text:span><text:span text:style-name="T23">NOS</text:span></text:p>
            <text:p text:style-name="P31"><text:span text:style-name="T23">"As </text:span><text:span text:style-name="T23">objeções </text:span><text:span text:style-name="T23">com </text:span><text:span text:style-name="T23">resposta </text:span><text:span text:style-name="T23">pronta </text:span><text:span text:style-name="T23">salvaram-me </text:span><text:span text:style-name="T23">várias </text:span><text:span text:style-name="T23">chamadas." </text:span><text:span text:style-name="T23">— Carlos </text:span><text:span text:style-name="T23">P., MEO</text:span></text:p>
            <text:p text:style-name="P31"><text:span text:style-name="T23">"Em 3 dias </text:span><text:span text:style-name="T23">já estava a </text:span><text:span text:style-name="T23">vender. O </text:span><text:span text:style-name="T23">script </text:span><text:span text:style-name="T23">ajudou </text:span><text:span text:style-name="T23">imenso." — </text:span><text:span text:style-name="T23">Mariana C., </text:span><text:span text:style-name="T23">nova </text:span><text:span text:style-name="T23">gestora</text:span></text:p>
            <text:p text:style-name="P31"><text:span text:style-name="T23">"Vejo os </text:span><text:span text:style-name="T23">KPIs ao </text:span><text:span text:style-name="T23">minuto. Sei </text:span><text:span text:style-name="T23">exatamente </text:span><text:span text:style-name="T23">quem </text:span><text:span text:style-name="T23">precisa de </text:span><text:span text:style-name="T23">apoio." — </text:span><text:span text:style-name="T23">Rui S., </text:span><text:span text:style-name="T23">coordenador</text:span></text:p>
            <text:p text:style-name="P31"><text:span text:style-name="T24"/></text:p>
            <text:p text:style-name="P31"><text:span text:style-name="T23">Feedback </text:span><text:span text:style-name="T23">real de </text:span><text:span text:style-name="T23">utilizadore</text:span><text:span text:style-name="T23">s durante o </text:span><text:span text:style-name="T23">piloto</text:span></text:p>
          </draw:text-box>
        </draw:frame>
        <anim:par presentation:node-type="timing-root">
          <anim:par smil:begin="id12.begin">
            <anim:transitionFilter smil:dur="2s" smil:type="slideWipe" smil:subtype="fromTop" smil:direction="reverse"/>
          </anim:par>
        </anim:par>
        <presentation:notes draw:style-name="dp2"/>
      </draw:page>
      <draw:page draw:name="page13" draw:style-name="dp3" draw:master-page-name="Metropolis" presentation:presentation-page-layout-name="AL1T1" xml:id="id13" draw:id="id13">
        <office:forms form:automatic-focus="false" form:apply-design-mode="false"/>
        <draw:frame presentation:style-name="pr10" draw:text-style-name="P33" draw:layer="layout" svg:width="7.4cm" svg:height="2.864cm" svg:x="10.6cm" svg:y="-0.29cm" presentation:class="title" presentation:user-transformed="true">
          <draw:text-box>
            <text:p text:style-name="P29"><text:span text:style-name="T25">Planos</text:span></text:p>
          </draw:text-box>
        </draw:frame>
        <draw:frame presentation:style-name="pr2" draw:text-style-name="P34" draw:layer="layout" svg:width="25.2cm" svg:height="10.548cm" svg:x="1.4cm" svg:y="2.8cm" presentation:class="outline" presentation:user-transformed="true">
          <draw:text-box>
            <text:p text:style-name="P31"><text:span text:style-name="T24">Start — </text:span><text:span text:style-name="T24">Grátis (até </text:span><text:span text:style-name="T24">3 gestores. </text:span><text:span text:style-name="T24">Base)</text:span></text:p>
            <text:p text:style-name="P31"><text:span text:style-name="T24">Pro — </text:span><text:span text:style-name="T24">9,90€/mês/ge</text:span><text:span text:style-name="T24">stor (até </text:span><text:span text:style-name="T24">20. CRM + </text:span><text:span text:style-name="T24">Aprovação)</text:span></text:p>
            <text:p text:style-name="P31"><text:span text:style-name="T24">Enterprise — </text:span><text:span text:style-name="T24">Sob consulta </text:span><text:span text:style-name="T24">(+20. On-</text:span><text:span text:style-name="T24">premise, </text:span><text:span text:style-name="T24">API)</text:span></text:p>
            <text:p text:style-name="P31"><text:span text:style-name="T24"/></text:p>
            <text:p text:style-name="P31"><text:span text:style-name="T24">Inclui: site </text:span><text:span text:style-name="T24">leads, </text:span><text:span text:style-name="T24">toolkit </text:span><text:span text:style-name="T24">vendas, CRM, </text:span><text:span text:style-name="T24">aprovação </text:span><text:span text:style-name="T24">email, </text:span><text:span text:style-name="T24">suporte </text:span><text:span text:style-name="T24">WhatsApp</text:span></text:p>
          </draw:text-box>
        </draw:frame>
        <anim:par presentation:node-type="timing-root">
          <anim:par smil:begin="id13.begin">
            <anim:transitionFilter smil:dur="2s" smil:type="slideWipe" smil:subtype="fromTop" smil:direction="reverse"/>
          </anim:par>
        </anim:par>
        <presentation:notes draw:style-name="dp2"/>
      </draw:page>
      <draw:page draw:name="page14" draw:style-name="dp3" draw:master-page-name="Metropolis" presentation:presentation-page-layout-name="AL1T1" xml:id="id14" draw:id="id14">
        <office:forms form:automatic-focus="false" form:apply-design-mode="false"/>
        <draw:frame presentation:style-name="pr11" draw:text-style-name="P30" draw:layer="layout" svg:width="14.8cm" svg:height="2.23cm" svg:x="8cm" svg:y="0.189cm" presentation:class="title" presentation:user-transformed="true">
          <draw:text-box>
            <text:p text:style-name="P29"><text:span text:style-name="T1">Próximos Passos</text:span></text:p>
          </draw:text-box>
        </draw:frame>
        <draw:frame presentation:style-name="pr2" draw:text-style-name="P34" draw:layer="layout" svg:width="25.2cm" svg:height="10.548cm" svg:x="1.4cm" svg:y="3.7cm" presentation:class="outline" presentation:user-transformed="true">
          <draw:text-box>
            <text:p text:style-name="P31"><text:span text:style-name="T24">1. Demonstração </text:span><text:span text:style-name="T24">ao vivo (30 min)</text:span></text:p>
            <text:p text:style-name="P31"><text:span text:style-name="T24">2. Teste </text:span><text:span text:style-name="T24">gratuito (7 </text:span><text:span text:style-name="T24">dias)</text:span></text:p>
            <text:p text:style-name="P31"><text:span text:style-name="T24">3. Onboarding </text:span><text:span text:style-name="T24">com formação</text:span></text:p>
            <text:p text:style-name="P31"><text:span text:style-name="T24"/></text:p>
            <text:p text:style-name="P31"><text:span text:style-name="T24">Contacto: </text:span><text:span text:style-name="T24">comercial@gcc.pt </text:span><text:span text:style-name="T24">| WhatsApp: 912 </text:span><text:span text:style-name="T24">345 678</text:span></text:p>
          </draw:text-box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Mono Uralic" svg:font-family="'Mono Uralic'" style:font-pitch="fixed"/>
    <style:font-face style:name="Mono Uralic1" svg:font-family="'Mono Ural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monofur" svg:font-family="monofur" style:font-pitch="variable"/>
    <style:font-face style:name="monofur1" svg:font-family="monofu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E12027F83717C3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4:21:05.511987550</meta:creation-date>
    <meta:editing-duration>PT1H58M12S</meta:editing-duration>
    <meta:editing-cycles>3</meta:editing-cycles>
    <meta:generator>LibreOffice/7.4.7.2$Linux_X86_64 LibreOffice_project/40$Build-2</meta:generator>
    <dc:title>Metropolis</dc:title>
    <dc:date>2026-07-05T16:24:50.855861443</dc:date>
    <meta:document-statistic meta:object-count="75"/>
  </office:meta>
</office:document-meta>
</file>