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ma" svg:font-family="Loma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Loma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ripts Completos por Perfil de Cliente</text:p>
      <text:p text:style-name="P1"/>
      <text:p text:style-name="P1">Perfil A: Cliente Satisfeito com a MEO (mas curioso)</text:p>
      <text:p text:style-name="P1"/>
      <text:p text:style-name="P1">Tu: "Boa tarde, estou a falar com [NOME]? Sou gestor de telecomunicações.</text:p>
      <text:p text:style-name="P1"><text:s text:c="5"/>Tenho indicação que o seu contrato está a terminar. Como é que o</text:p>
      <text:p text:style-name="P1"><text:s text:c="5"/>serviço tem corrido?"</text:p>
      <text:p text:style-name="P1"/>
      <text:p text:style-name="P1">Cliente: "Até nem me posso queixar, funciona bem."</text:p>
      <text:p text:style-name="P1"/>
      <text:p text:style-name="P1">Tu: "Ainda bem que ouve isso. E há quanto tempo não trocam os equipamentos?"</text:p>
      <text:p text:style-name="P1"/>
      <text:p text:style-name="P1">Cliente: "Já vai para uns anos, 3 ou 4."</text:p>
      <text:p text:style-name="P1"/>
      <text:p text:style-name="P1">Tu: "Pois, é exatamente por isso que lhe estou a ligar. Hoje temos uma</text:p>
      <text:p text:style-name="P1"><text:s text:c="5"/>campanha de renovação — equipamentos novos, mais velocidade e um</text:p>
      <text:p text:style-name="P1"><text:s text:c="5"/>valor inferior ao que paga de momento.</text:p>
      <text:p text:style-name="P1"><text:s text:c="5"/>Só para ter uma ideia: quanto está a pagar atualmente?"</text:p>
      <text:p text:style-name="P1">```</text:p>
      <text:p text:style-name="P1"/>
      <text:p text:style-name="P1">Perfil B: Cliente Insatisfeito (lento/falhas)</text:p>
      <text:p text:style-name="P1"/>
      <text:p text:style-name="P1">Tu: "Boa tarde, [NOME]? Sou gestor de telecomunicações e tenho aqui</text:p>
      <text:p text:style-name="P1"><text:s text:c="5"/>registo que o seu contrato está perto de terminar.</text:p>
      <text:p text:style-name="P1"><text:s text:c="5"/>Como tem sido o serviço nestes últimos meses?"</text:p>
      <text:p text:style-name="P1"/>
      <text:p text:style-name="P1">Cliente: "É uma vergonha, a net cai todos os dias."</text:p>
      <text:p text:style-name="P1"/>
      <text:p text:style-name="P1">Tu: "Infelizmente é um feedback que ouço com frequência. E esse é</text:p>
      <text:p text:style-name="P1"><text:s text:c="5"/>exatamente o motivo do meu contacto — temos uma oferta pensada</text:p>
      <text:p text:style-name="P1"><text:s text:c="5"/>para clientes como o/a [SR./SRA.] que precisam de estabilidade.</text:p>
      <text:p text:style-name="P1"><text:s text:c="5"/>Sempre ouviu falar da fibra NOS?"</text:p>
      <text:p text:style-name="P1">```</text:p>
      <text:p text:style-name="P1"/>
      <text:p text:style-name="P1">Perfil C: Cliente Apressado ("não tenho tempo")</text:p>
      <text:p text:style-name="P1"/>
      <text:p text:style-name="P1">Tu: "Boa tarde, [NOME]? Sou gestor de telecomunicações. O seu contrato</text:p>
      <text:p text:style-name="P1"><text:s text:c="5"/>MEO está a terminar — eu sei que está ocupado, por isso vou ser</text:p>
      <text:p text:style-name="P1"><text:soft-page-break/><text:s text:c="5"/>direto: quanto está a pagar atualmente?"</text:p>
      <text:p text:style-name="P1"/>
      <text:p text:style-name="P1">Cliente: "Olhe não tenho tempo para isso."</text:p>
      <text:p text:style-name="P1"/>
      <text:p text:style-name="P1">Tu: "Percebo, nem 1 minuto demora. Só preciso de saber o valor da sua</text:p>
      <text:p text:style-name="P1"><text:s text:c="5"/>fatura para ver se vale a pena continuarmos a conversa noutra altura.</text:p>
      <text:p text:style-name="P1"><text:s text:c="5"/>Se não compensar, nem perde mais tempo."</text:p>
      <text:p text:style-name="P1">```</text:p>
      <text:p text:style-name="P1">Ensaios de Objeções (Roleplay)</text:p>
      <text:p text:style-name="P1"/>
      <text:p text:style-name="P1">Treina com um colega ou grava-te. Resposta em **3 segundos** no máximo.</text:p>
      <text:p text:style-name="P1"/>
      <text:p text:style-name="P1">Objeção 1: "Não estou interessado."</text:p>
      <text:p text:style-name="P1">- **Errada**: "Mas ouça só a oferta..."</text:p>
      <text:p text:style-name="P1">- **Certa**: "Perfeito, nem quero que esteja. Só quero perceber uma coisa:</text:p>
      <text:p text:style-name="P1"><text:s text:c="4"/>o valor que paga hoje é justo para o que recebe?"</text:p>
      <text:p text:style-name="P1"/>
      <text:p text:style-name="P1">Objeção 2: "Já tenho NOS."</text:p>
      <text:p text:style-name="P1">- **Errada**: Desligar ou insistir.</text:p>
      <text:p text:style-name="P1">- **Certa**: "Ótimo, já conhece a qualidade. Esta campanha é para clientes</text:p>
      <text:p text:style-name="P1"><text:s text:c="4"/>que estão a terminar fidelização — podemos otimizar o seu pacote</text:p>
      <text:p text:style-name="P1"><text:s text:c="4"/>atual. Quando foi a última vez que renegociou?"</text:p>
      <text:p text:style-name="P1"/>
      <text:p text:style-name="P1">Objeção 3: "Mande um email com a proposta."</text:p>
      <text:p text:style-name="P1">- **Errada**: "Claro, qual é o seu email?"</text:p>
      <text:p text:style-name="P1">- **Certa**: "Prefiro enviar a proposta certa. Se eu mandar agora sem</text:p>
      <text:p text:style-name="P1"><text:s text:c="4"/>perceber o seu pacote, posso enviar algo que não serve. Diz-me só:</text:p>
      <text:p text:style-name="P1"><text:s text:c="4"/>quanto paga atualmente e o que tem incluído? Em 30 segundos</text:p>
      <text:p text:style-name="P1"><text:s text:c="4"/>consigo dizer-lhe se compensa."</text:p>
      <text:p text:style-name="P1"/>
      <text:p text:style-name="P1">Objeção 4: "Tenho de falar com o meu marido/mulher."</text:p>
      <text:p text:style-name="P1">- **Errada**: "Mas a decisão é sua."</text:p>
      <text:p text:style-name="P1">- **Certa**: "Claro, é importante decidirem juntos. O que acha de</text:p>
      <text:p text:style-name="P1"><text:s text:c="4"/>eu enviar a proposta por email para verem os dois? Preciso só</text:p>
      <text:p text:style-name="P1"><text:s text:c="4"/>do seu email e do IBAN para deixar a proposta reservada —</text:p>
      <text:p text:style-name="P1"><text:s text:c="4"/>sem compromisso, se não quiserem avançar cancelamos."</text:p>
      <text:p text:style-name="P1"/>
      <text:p text:style-name="P1">Objeção 5: "É muito caro."</text:p>
      <text:p text:style-name="P1"><text:soft-page-break/>- **Errada**: Baixar logo o preço.</text:p>
      <text:p text:style-name="P1">- **Certa**: "Comparado com o que paga hoje, fica X€ mais barato.</text:p>
      <text:p text:style-name="P1"><text:s text:c="4"/>Ao fim de 2 anos são 312€ de diferença. Onde é que prefere</text:p>
      <text:p text:style-name="P1"><text:s text:c="4"/>gastar esse dinheiro?"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ma" svg:font-family="Loma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WenQuanYi Zen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WenQuanYi Zen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2T14:07:00.336808688</meta:creation-date>
    <meta:print-date>2026-07-02T14:12:03.144752630</meta:print-date>
    <dc:date>2026-07-02T14:16:47.302583971</dc:date>
    <meta:editing-duration>PT9M48S</meta:editing-duration>
    <meta:editing-cycles>1</meta:editing-cycles>
    <meta:document-statistic meta:table-count="0" meta:image-count="0" meta:object-count="0" meta:page-count="3" meta:paragraph-count="60" meta:word-count="516" meta:character-count="3070" meta:non-whitespace-character-count="2495"/>
    <meta:generator>LibreOffice/7.4.7.2$Linux_X86_64 LibreOffice_project/40$Build-2</meta:generator>
  </office:meta>
</office:document-meta>
</file>